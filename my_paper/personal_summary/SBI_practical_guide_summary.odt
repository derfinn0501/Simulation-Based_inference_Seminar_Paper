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33460" officeooo:paragraph-rsid="00033460"/>
    </style:style>
    <style:style style:name="P2" style:family="paragraph" style:parent-style-name="Heading_20_1">
      <style:text-properties officeooo:rsid="00033460" officeooo:paragraph-rsid="00033460"/>
    </style:style>
    <style:style style:name="P3" style:family="paragraph" style:parent-style-name="Text_20_body" style:list-style-name="L1">
      <style:text-properties officeooo:rsid="00033460" officeooo:paragraph-rsid="00033460"/>
    </style:style>
    <style:style style:name="P4" style:family="paragraph" style:parent-style-name="Text_20_body" style:list-style-name="L1">
      <style:text-properties officeooo:rsid="0003d69f" officeooo:paragraph-rsid="0003d69f"/>
    </style:style>
    <style:style style:name="P5" style:family="paragraph" style:parent-style-name="Text_20_body" style:list-style-name="L2">
      <style:text-properties officeooo:rsid="0003d69f" officeooo:paragraph-rsid="0003d69f"/>
    </style:style>
    <style:style style:name="P6" style:family="paragraph" style:parent-style-name="Text_20_body" style:list-style-name="L3">
      <style:text-properties officeooo:rsid="00053279" officeooo:paragraph-rsid="00053279"/>
    </style:style>
    <style:style style:name="P7" style:family="paragraph" style:parent-style-name="Text_20_body" style:list-style-name="L3">
      <style:text-properties officeooo:rsid="000820f4" officeooo:paragraph-rsid="000820f4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BI: A practical Guide</text:p>
      <text:h text:style-name="P2" text:outline-level="1">Intro:</text:h>
      <text:list text:style-name="L1">
        <text:list-item>
          <text:p text:style-name="P3">SBI is a solution for when no explicit likelihood is calculable (because of computational limits or mathematical infeasibilty)</text:p>
        </text:list-item>
        <text:list-item>
          <text:p text:style-name="P3">Simulators are sometimes black-box systems that are not available in closed form likelihood</text:p>
        </text:list-item>
        <text:list-item>
          <text:p text:style-name="P3">→ thus SBI is referred as likelihood-free inference</text:p>
        </text:list-item>
        <text:list-item>
          <text:p text:style-name="P4">SBI’s workflow:</text:p>
        </text:list-item>
      </text:list>
      <text:list text:style-name="L2">
        <text:list-item>
          <text:p text:style-name="P5">are have prior knowledge over some parameters</text:p>
        </text:list-item>
        <text:list-item>
          <text:p text:style-name="P5">from these distributions we draw simulated data x</text:p>
        </text:list-item>
        <text:list-item>
          <text:p text:style-name="P5">then a inference network is trained on simulated data</text:p>
        </text:list-item>
        <text:list-item>
          <text:p text:style-name="P5">In neural posterior estimation (NPE) the inference network is a conditional generative model which has x as input and outputs a distribution of parameters</text:p>
        </text:list-item>
        <text:list-item>
          <text:p text:style-name="P5">Evaluate network at new data <text:span text:style-name="T2">x</text:span><text:span text:style-name="T1">0 </text:span></text:p>
        </text:list-item>
      </text:list>
      <text:list text:style-name="L3">
        <text:list-item>
          <text:p text:style-name="P6">this structure enables amortized inference (here the forward pass inference is meant)</text:p>
        </text:list-item>
        <text:list-item>
          <text:p text:style-name="P7">Evaluating the joint distribution of the parameter and x<text:span text:style-name="T1"> </text:span><text:span text:style-name="T2">(p(theta,x) at x</text:span><text:span text:style-name="T1">0 </text:span><text:span text:style-name="T2">is like cutting through the joint and get results for Theta</text:span></text:p>
        </text:list-item>
        <text:list-item>
          <text:p text:style-name="P7">in practice obtaining this cut is difficult as no simulation matches the exact x<text:span text:style-name="T1">0 </text:span><text:span text:style-name="T2">(for continous data) → Approximate Bayesian Computation (ABC) approaches this by distance measure, but it is quite hard in higher dimensions to find a sensible distance measure</text:span></text:p>
        </text:list-item>
        <text:list-item>
          <text:p text:style-name="P7">inference networks overcome this evaluation problem by learning a relationship between x and Thet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0:03:15.689634568</meta:creation-date>
    <dc:date>2026-05-07T16:24:27.149151900</dc:date>
    <meta:editing-duration>PT5H40M3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203" meta:character-count="1237" meta:non-whitespace-character-count="1061"/>
  </office:meta>
</office:document-meta>
</file>